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style:font-name="Tahoma" fo:font-size="22pt" fo:font-style="italic" style:font-size-asian="22pt" style:font-style-asian="italic" style:font-name-complex="Tahoma" style:font-size-complex="22pt"/>
    </style:style>
    <style:style style:name="P3" style:family="paragraph" style:parent-style-name="Standard">
      <style:paragraph-properties fo:text-align="end" style:justify-single-word="false"/>
      <style:text-properties style:font-name="Tahoma" fo:font-size="18pt" fo:font-style="italic" style:font-size-asian="18pt" style:font-style-asian="italic" style:font-name-complex="Tahoma" style:font-size-complex="18pt"/>
    </style:style>
    <style:style style:name="P4" style:family="paragraph" style:parent-style-name="Standard">
      <style:text-properties style:font-name="Tahoma" fo:font-size="14pt" style:text-underline-style="solid" style:text-underline-width="auto" style:text-underline-color="font-color" fo:font-weight="bold" style:font-size-asian="14pt" style:font-weight-asian="bold" style:font-name-complex="Tahoma" style:font-size-complex="14pt"/>
    </style:style>
    <style:style style:name="P5" style:family="paragraph" style:parent-style-name="Standard">
      <style:text-properties style:font-name="Tahoma" fo:font-size="14pt" style:text-underline-style="solid" style:text-underline-width="auto" style:text-underline-color="font-color" style:font-size-asian="14pt" style:font-name-complex="Tahoma" style:font-size-complex="14pt"/>
    </style:style>
    <style:style style:name="P6" style:family="paragraph" style:parent-style-name="Standard">
      <style:text-properties style:font-name="Tahoma" fo:font-size="14pt" style:font-size-asian="14pt" style:font-name-complex="Tahoma" style:font-size-complex="14pt"/>
    </style:style>
    <style:style style:name="P7" style:family="paragraph" style:parent-style-name="Standard">
      <style:paragraph-properties fo:text-align="center" style:justify-single-word="false"/>
      <style:text-properties style:font-name="Tahoma" fo:font-size="14pt" style:font-size-asian="14pt" style:font-name-complex="Tahoma" style:font-size-complex="14pt"/>
    </style:style>
    <style:style style:name="P8" style:family="paragraph" style:parent-style-name="Standard">
      <style:paragraph-properties style:text-autospace="none"/>
      <style:text-properties style:font-name="Tahoma" fo:font-size="14pt" style:font-size-asian="14pt" style:font-name-complex="Tahoma" style:font-size-complex="14pt"/>
    </style:style>
    <style:style style:name="P9" style:family="paragraph" style:parent-style-name="Standard">
      <style:paragraph-properties style:text-autospace="none"/>
      <style:text-properties style:font-name="Tahoma" fo:font-size="14pt" style:font-size-asian="14pt" style:font-name-complex="Tahoma" style:font-size-complex="14pt" style:font-weight-complex="bold"/>
    </style:style>
    <style:style style:name="P10" style:family="paragraph" style:parent-style-name="Standard">
      <style:paragraph-properties fo:text-align="center" style:justify-single-word="false"/>
      <style:text-properties style:font-name="Tahoma" fo:font-size="14pt" fo:font-weight="bold" style:font-size-asian="14pt" style:font-weight-asian="bold" style:font-name-complex="Tahoma" style:font-size-complex="14pt"/>
    </style:style>
    <style:style style:name="P11" style:family="paragraph" style:parent-style-name="Standard">
      <style:paragraph-properties fo:text-align="center" style:justify-single-word="false" style:text-autospace="none"/>
      <style:text-properties style:font-name="Tahoma" fo:font-size="14pt" fo:font-weight="bold" style:font-size-asian="14pt" style:font-weight-asian="bold" style:font-name-complex="Tahoma" style:font-size-complex="14pt"/>
    </style:style>
    <style:style style:name="P12" style:family="paragraph" style:parent-style-name="Standard">
      <style:paragraph-properties style:text-autospace="none"/>
      <style:text-properties style:font-name="Tahoma" fo:font-size="14pt" fo:font-weight="bold" style:font-size-asian="14pt" style:font-weight-asian="bold" style:font-name-complex="Tahoma" style:font-size-complex="14pt" style:font-weight-complex="bold"/>
    </style:style>
    <style:style style:name="P13" style:family="paragraph" style:parent-style-name="Standard">
      <style:text-properties style:font-name="Tahoma" fo:font-size="14pt" fo:language="ru" fo:country="RU" style:text-underline-style="solid" style:text-underline-width="auto" style:text-underline-color="font-color" style:font-size-asian="14pt" style:font-name-complex="Tahoma" style:font-size-complex="14pt"/>
    </style:style>
    <style:style style:name="P14" style:family="paragraph" style:parent-style-name="Standard">
      <style:paragraph-properties style:text-autospace="none"/>
    </style:style>
    <style:style style:name="P15" style:family="paragraph" style:parent-style-name="Standard">
      <style:paragraph-properties style:text-autospace="none"/>
      <style:text-properties fo:color="#000000" style:font-name="Tahoma" fo:font-size="14pt" fo:font-weight="bold" style:font-size-asian="14pt" style:font-weight-asian="bold" style:font-name-complex="Tahoma" style:font-size-complex="14pt"/>
    </style:style>
    <style:style style:name="P16" style:family="paragraph" style:parent-style-name="Standard">
      <style:paragraph-properties fo:text-align="center" style:justify-single-word="false"/>
      <style:text-properties fo:color="#000000" style:font-name="Tahoma" fo:font-size="14pt" fo:font-weight="bold" style:font-size-asian="14pt" style:font-weight-asian="bold" style:font-name-complex="Tahoma" style:font-size-complex="14pt"/>
    </style:style>
    <style:style style:name="P17" style:family="paragraph" style:parent-style-name="Standard">
      <style:paragraph-properties fo:text-align="center" style:justify-single-word="false" style:text-autospace="none"/>
      <style:text-properties fo:color="#000000" style:font-name="Tahoma" fo:font-size="14pt" fo:font-weight="bold" style:font-size-asian="14pt" style:font-weight-asian="bold" style:font-name-complex="Tahoma" style:font-size-complex="14pt"/>
    </style:style>
    <style:style style:name="P18" style:family="paragraph" style:parent-style-name="Standard">
      <style:text-properties fo:color="#000000" style:font-name="Tahoma" fo:font-size="14pt" style:font-size-asian="14pt" style:font-name-complex="Tahoma" style:font-size-complex="14pt"/>
    </style:style>
    <style:style style:name="P19" style:family="paragraph" style:parent-style-name="Standard">
      <style:paragraph-properties style:text-autospace="none"/>
      <style:text-properties fo:color="#000000" style:font-name="Tahoma" fo:font-size="14pt" style:font-size-asian="14pt" style:font-name-complex="Tahoma" style:font-size-complex="14pt"/>
    </style:style>
    <style:style style:name="P20" style:family="paragraph" style:parent-style-name="Standard">
      <style:paragraph-properties style:text-autospace="none"/>
      <style:text-properties fo:color="#000000" style:font-name="Tahoma" fo:font-size="14pt" style:font-size-asian="14pt" style:font-name-complex="Tahoma" style:font-size-complex="14pt" style:font-weight-complex="bold"/>
    </style:style>
    <style:style style:name="P21" style:family="paragraph" style:parent-style-name="Standard">
      <style:text-properties fo:color="#000000" style:font-name="Tahoma" fo:font-size="14pt" style:text-underline-style="solid" style:text-underline-width="auto" style:text-underline-color="font-color" style:font-size-asian="14pt" style:font-name-complex="Tahoma" style:font-size-complex="14pt"/>
    </style:style>
    <style:style style:name="P22" style:family="paragraph" style:parent-style-name="Standard">
      <style:paragraph-properties style:text-autospace="none"/>
      <style:text-properties fo:color="#000000" style:font-name="Tahoma" fo:font-weight="bold" style:font-weight-asian="bold" style:font-name-complex="Tahoma"/>
    </style:style>
    <style:style style:name="P23" style:family="paragraph" style:parent-style-name="Standard">
      <style:paragraph-properties style:text-autospace="none"/>
      <style:text-properties fo:color="#000000" style:font-name="Tahoma" style:font-name-complex="Tahoma"/>
    </style:style>
    <style:style style:name="P24" style:family="paragraph" style:parent-style-name="Standard">
      <style:paragraph-properties style:text-autospace="none"/>
      <style:text-properties fo:color="#000000" style:font-name="Arial Black" fo:font-weight="bold" style:font-weight-asian="bold" style:font-name-complex="Arial Black"/>
    </style:style>
    <style:style style:name="P25" style:family="paragraph" style:parent-style-name="Standard">
      <style:paragraph-properties style:text-autospace="none"/>
      <style:text-properties fo:color="#000000" style:font-name="Arial Black" fo:font-size="20pt" fo:font-weight="bold" style:font-size-asian="20pt" style:font-weight-asian="bold" style:font-name-complex="Arial Black" style:font-size-complex="20pt"/>
    </style:style>
    <style:style style:name="P26" style:family="paragraph" style:parent-style-name="Standard">
      <style:paragraph-properties fo:margin-left="0in" fo:margin-right="0in" fo:text-indent="0.4917in" style:auto-text-indent="false"/>
      <style:text-properties style:font-name="Tahoma" fo:font-size="14pt" style:font-size-asian="14pt" style:font-name-complex="Tahoma" style:font-size-complex="14pt"/>
    </style:style>
    <style:style style:name="P27" style:family="paragraph" style:parent-style-name="Standard">
      <style:paragraph-properties fo:margin-left="0in" fo:margin-right="0in" fo:text-indent="0.4917in" style:auto-text-indent="false" style:text-autospace="none"/>
    </style:style>
    <style:style style:name="P28" style:family="paragraph" style:parent-style-name="Standard">
      <style:paragraph-properties fo:margin-left="1.4752in" fo:margin-right="0in" fo:text-indent="0.4917in" style:auto-text-indent="false" style:text-autospace="none"/>
    </style:style>
    <style:style style:name="P29" style:family="paragraph" style:parent-style-name="Standard" style:master-page-name="Standard">
      <style:paragraph-properties fo:text-align="center" style:justify-single-word="false" style:page-number="auto"/>
      <style:text-properties style:font-name="Tahoma" fo:font-size="22pt" fo:font-weight="bold" style:font-size-asian="22pt" style:font-weight-asian="bold" style:font-name-complex="Tahoma" style:font-size-complex="22pt"/>
    </style:style>
    <style:style style:name="P30" style:family="paragraph" style:parent-style-name="Standard">
      <style:paragraph-properties fo:text-align="end" style:justify-single-word="false"/>
      <style:text-properties style:font-name="Tahoma" fo:font-size="22pt" fo:font-style="italic" style:font-size-asian="22pt" style:font-style-asian="italic" style:font-name-complex="Tahoma" style:font-size-complex="22pt"/>
    </style:style>
    <style:style style:name="P31" style:family="paragraph" style:parent-style-name="Standard">
      <style:text-properties style:font-name="Tahoma" fo:font-size="14pt" style:font-size-asian="14pt" style:font-name-complex="Tahoma" style:font-size-complex="14pt"/>
    </style:style>
    <style:style style:name="P32" style:family="paragraph" style:parent-style-name="Standard">
      <style:paragraph-properties style:text-autospace="none"/>
      <style:text-properties style:font-name="Tahoma" fo:font-size="14pt" style:font-size-asian="14pt" style:font-name-complex="Tahoma" style:font-size-complex="14pt"/>
    </style:style>
    <style:style style:name="P33" style:family="paragraph" style:parent-style-name="Standard" style:list-style-name="WW8Num1">
      <style:paragraph-properties style:text-autospace="none"/>
      <style:text-properties style:font-name="Tahoma" fo:font-size="14pt" style:font-size-asian="14pt" style:font-name-complex="Tahoma" style:font-size-complex="14pt"/>
    </style:style>
    <style:style style:name="P34" style:family="paragraph" style:parent-style-name="Standard" style:list-style-name="WW8Num3">
      <style:paragraph-properties style:text-autospace="none"/>
      <style:text-properties style:font-name="Tahoma" fo:font-size="14pt" style:font-size-asian="14pt" style:font-name-complex="Tahoma" style:font-size-complex="14pt"/>
    </style:style>
    <style:style style:name="P35" style:family="paragraph" style:parent-style-name="Standard">
      <style:paragraph-properties fo:text-align="center" style:justify-single-word="false"/>
      <style:text-properties style:font-name="Tahoma" fo:font-size="14pt" fo:font-weight="bold" style:font-size-asian="14pt" style:font-weight-asian="bold" style:font-name-complex="Tahoma" style:font-size-complex="14pt"/>
    </style:style>
    <style:style style:name="P36" style:family="paragraph" style:parent-style-name="Standard">
      <style:paragraph-properties fo:text-align="center" style:justify-single-word="false" style:text-autospace="none"/>
      <style:text-properties style:font-name="Tahoma" fo:font-size="14pt" fo:font-weight="bold" style:font-size-asian="14pt" style:font-weight-asian="bold" style:font-name-complex="Tahoma" style:font-size-complex="14pt"/>
    </style:style>
    <style:style style:name="P37" style:family="paragraph" style:parent-style-name="Standard">
      <style:text-properties fo:color="#000000" style:font-name="Tahoma" fo:font-size="14pt" style:font-size-asian="14pt" style:font-name-complex="Tahoma" style:font-size-complex="14pt"/>
    </style:style>
    <style:style style:name="P38" style:family="paragraph" style:parent-style-name="Standard">
      <style:paragraph-properties style:text-autospace="none"/>
      <style:text-properties fo:color="#000000" style:font-name="Tahoma" fo:font-size="14pt" style:font-size-asian="14pt" style:font-name-complex="Tahoma" style:font-size-complex="14pt"/>
    </style:style>
    <style:style style:name="P39" style:family="paragraph" style:parent-style-name="Standard" style:list-style-name="WW8Num2">
      <style:paragraph-properties style:text-autospace="none"/>
      <style:text-properties fo:color="#000000" style:font-name="Tahoma" fo:font-size="14pt" style:font-size-asian="14pt" style:font-name-complex="Tahoma" style:font-size-complex="14pt"/>
    </style:style>
    <style:style style:name="P40" style:family="paragraph" style:parent-style-name="Standard" style:list-style-name="WW8Num4">
      <style:paragraph-properties style:text-autospace="none"/>
      <style:text-properties fo:color="#000000" style:font-name="Tahoma" fo:font-size="14pt" style:font-size-asian="14pt" style:font-name-complex="Tahoma" style:font-size-complex="14pt"/>
    </style:style>
    <style:style style:name="P41" style:family="paragraph" style:parent-style-name="Standard">
      <style:paragraph-properties fo:text-align="center" style:justify-single-word="false" style:text-autospace="none"/>
      <style:text-properties fo:color="#000000" style:font-name="Tahoma" fo:font-size="14pt" fo:font-weight="bold" style:font-size-asian="14pt" style:font-weight-asian="bold" style:font-name-complex="Tahoma" style:font-size-complex="14pt"/>
    </style:style>
    <style:style style:name="P42" style:family="paragraph" style:parent-style-name="Standard">
      <style:paragraph-properties fo:margin-left="0in" fo:margin-right="0in" fo:text-indent="0.4917in" style:auto-text-indent="false"/>
      <style:text-properties style:font-name="Tahoma" fo:font-size="14pt" style:font-size-asian="14pt" style:font-name-complex="Tahoma" style:font-size-complex="14pt"/>
    </style:style>
    <style:style style:name="P43" style:family="paragraph" style:parent-style-name="Standard">
      <style:paragraph-properties fo:margin-left="0.9835in" fo:margin-right="0in" fo:text-indent="0in" style:auto-text-indent="false"/>
      <style:text-properties style:font-name="Tahoma" fo:font-size="14pt" style:font-size-asian="14pt" style:font-name-complex="Tahoma" style:font-size-complex="14pt"/>
    </style:style>
    <style:style style:name="P44" style:family="paragraph" style:parent-style-name="Standard">
      <style:paragraph-properties fo:margin-left="0.4917in" fo:margin-right="0in" fo:text-align="end" style:justify-single-word="false" fo:text-indent="0in" style:auto-text-indent="false"/>
      <style:text-properties style:font-name="Tahoma" fo:font-size="14pt" style:font-size-asian="14pt" style:font-name-complex="Tahoma" style:font-size-complex="14pt"/>
    </style:style>
    <style:style style:name="T1" style:family="text">
      <style:text-properties style:font-name="Tahoma" fo:font-size="14pt" style:text-underline-style="solid" style:text-underline-width="auto" style:text-underline-color="font-color" style:font-size-asian="14pt" style:font-name-complex="Tahoma" style:font-size-complex="14pt"/>
    </style:style>
    <style:style style:name="T2" style:family="text">
      <style:text-properties style:font-name="Tahoma" fo:font-size="14pt" style:font-size-asian="14pt" style:font-name-complex="Tahoma" style:font-size-complex="14pt"/>
    </style:style>
    <style:style style:name="T3" style:family="text">
      <style:text-properties style:font-name="Tahoma" fo:font-size="14pt" style:font-size-asian="14pt" style:font-name-complex="Tahoma" style:font-size-complex="14pt" style:font-weight-complex="bold"/>
    </style:style>
    <style:style style:name="T4" style:family="text">
      <style:text-properties style:font-name="Tahoma" fo:font-size="14pt" fo:language="ru" fo:country="RU" style:font-size-asian="14pt" style:font-name-complex="Tahoma" style:font-size-complex="14pt"/>
    </style:style>
    <style:style style:name="T5" style:family="text">
      <style:text-properties style:font-name="Tahoma" fo:font-size="14pt" fo:font-weight="bold" style:font-size-asian="14pt" style:font-weight-asian="bold" style:font-name-complex="Tahoma" style:font-size-complex="14pt"/>
    </style:style>
    <style:style style:name="T6" style:family="text">
      <style:text-properties style:font-name="Tahoma" fo:font-size="14pt" fo:font-weight="bold" style:font-size-asian="14pt" style:font-weight-asian="bold" style:font-name-complex="Tahoma" style:font-size-complex="14pt" style:font-weight-complex="bold"/>
    </style:style>
    <style:style style:name="T7" style:family="text">
      <style:text-properties style:font-name="Tahoma" fo:font-size="14pt" fo:font-style="italic" fo:font-weight="bold" style:font-size-asian="14pt" style:font-style-asian="italic" style:font-weight-asian="bold" style:font-name-complex="Tahoma" style:font-size-complex="14pt" style:font-style-complex="italic"/>
    </style:style>
    <style:style style:name="T8" style:family="text">
      <style:text-properties style:font-name="Tahoma" fo:font-size="14pt" fo:language="bg" fo:country="BG" style:font-size-asian="14pt" style:font-name-complex="Tahoma" style:font-size-complex="14pt"/>
    </style:style>
    <style:style style:name="T9" style:family="text">
      <style:text-properties fo:color="#000000" style:font-name="Tahoma" fo:font-size="18pt" fo:font-style="italic" fo:font-weight="bold" style:font-size-asian="18pt" style:font-style-asian="italic" style:font-weight-asian="bold" style:font-name-complex="Tahoma" style:font-size-complex="18pt"/>
    </style:style>
    <style:style style:name="T10" style:family="text">
      <style:text-properties fo:color="#000000" style:font-name="Tahoma" fo:font-size="18pt" fo:language="en" fo:country="US" fo:font-style="italic" fo:font-weight="bold" style:font-size-asian="18pt" style:font-style-asian="italic" style:font-weight-asian="bold" style:font-name-complex="Tahoma" style:font-size-complex="18pt"/>
    </style:style>
    <style:style style:name="T11" style:family="text">
      <style:text-properties fo:color="#000000" style:font-name="Tahoma" fo:font-size="18pt" fo:language="ru" fo:country="RU" fo:font-style="italic" fo:font-weight="bold" style:font-size-asian="18pt" style:font-style-asian="italic" style:font-weight-asian="bold" style:font-name-complex="Tahoma" style:font-size-complex="18pt"/>
    </style:style>
    <style:style style:name="T12" style:family="text">
      <style:text-properties fo:color="#000000" style:font-name="Tahoma" fo:font-size="14pt" fo:font-weight="bold" style:font-size-asian="14pt" style:font-weight-asian="bold" style:font-name-complex="Tahoma" style:font-size-complex="14pt"/>
    </style:style>
    <style:style style:name="T13" style:family="text">
      <style:text-properties fo:color="#000000" style:font-name="Tahoma" fo:font-size="14pt" fo:font-weight="bold" style:font-size-asian="14pt" style:font-weight-asian="bold" style:font-name-complex="Tahoma" style:font-size-complex="14pt" style:font-weight-complex="bold"/>
    </style:style>
    <style:style style:name="T14" style:family="text">
      <style:text-properties fo:color="#000000" style:font-name="Tahoma" fo:font-size="14pt" style:font-size-asian="14pt" style:font-name-complex="Tahoma" style:font-size-complex="14pt"/>
    </style:style>
    <style:style style:name="T15" style:family="text">
      <style:text-properties fo:color="#000000" style:font-name="Tahoma" fo:font-size="14pt" style:text-underline-style="solid" style:text-underline-width="auto" style:text-underline-color="font-color" style:font-size-asian="14pt" style:font-name-complex="Tahoma" style:font-size-complex="14pt"/>
    </style:style>
    <style:style style:name="T16" style:family="text">
      <style:text-properties fo:color="#000000" style:font-name="Tahoma" fo:font-size="14pt" fo:font-style="italic" fo:font-weight="bold" style:font-size-asian="14pt" style:font-style-asian="italic" style:font-weight-asian="bold" style:font-name-complex="Tahoma" style:font-size-complex="14pt" style:font-style-complex="italic"/>
    </style:style>
    <style:style style:name="T17" style:family="text">
      <style:text-properties fo:color="#000000" style:font-name="Tahoma" fo:font-size="14pt" fo:font-style="italic" style:font-size-asian="14pt" style:font-style-asian="italic" style:font-name-complex="Tahoma" style:font-size-complex="14pt"/>
    </style:style>
    <style:style style:name="T18" style:family="text">
      <style:text-properties fo:color="#000000" style:font-name="Tahoma" fo:font-size="14pt" fo:language="ru" fo:country="RU" fo:font-weight="bold" style:font-size-asian="14pt" style:font-weight-asian="bold" style:font-name-complex="Tahoma" style:font-size-complex="14pt"/>
    </style:style>
    <style:style style:name="T19" style:family="text">
      <style:text-properties fo:color="#000000" style:font-name="Tahoma" fo:font-size="14pt" fo:language="ru" fo:country="RU" style:font-size-asian="14pt" style:font-name-complex="Tahoma" style:font-size-complex="14pt"/>
    </style:style>
    <style:style style:name="T20" style:family="text">
      <style:text-properties fo:color="#000000" style:font-name="Tahoma" style:font-name-complex="Tahoma"/>
    </style:style>
    <style:style style:name="T21" style:family="text">
      <style:text-properties fo:color="#000000" style:font-name="Tahoma" fo:language="ru" fo:country="RU" style:font-name-complex="Tahoma"/>
    </style:style>
    <style:style style:name="T22" style:family="text">
      <style:text-properties fo:color="#000000" style:font-name="Tahoma" fo:font-size="20pt" fo:font-weight="bold" style:font-size-asian="20pt" style:font-weight-asian="bold" style:font-name-complex="Tahoma" style:font-size-complex="20pt"/>
    </style:style>
    <style:style style:name="T23" style:family="text">
      <style:text-properties fo:color="#000000" style:font-name="Wingdings" fo:font-size="14pt" fo:language="en" fo:country="US" fo:font-weight="bold" style:font-size-asian="14pt" style:font-weight-asian="bold" style:font-size-complex="14pt"/>
    </style:style>
    <style:style style:name="T24" style:family="text">
      <style:text-properties fo:color="#000000" style:font-name="Wingdings" fo:font-size="14pt" fo:language="en" fo:country="US" fo:font-style="italic" style:font-size-asian="14pt" style:font-style-asian="italic" style:font-size-complex="14pt"/>
    </style:style>
    <style:style style:name="T25" style:family="text">
      <style:text-properties fo:color="#0000ff" style:font-name="Tahoma" fo:font-size="14pt" style:font-size-asian="14pt" style:font-name-complex="Tahoma" style:font-size-complex="14pt"/>
    </style:style>
    <style:style style:name="T26" style:family="text">
      <style:text-properties fo:color="#0000ff" style:font-name="Tahoma" fo:font-size="14pt" fo:font-weight="bold" style:font-size-asian="14pt" style:font-weight-asian="bold" style:font-name-complex="Tahoma"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Д А В И Д</text:p>
      <text:p text:style-name="P2">(книга игра)</text:p>
      <text:p text:style-name="P2">От Огнян Колев</text:p>
      <text:p text:style-name="P3"/>
      <text:p text:style-name="P1"><text:span text:style-name="T10">I</text:span><text:span text:style-name="T11"> </text:span><text:span text:style-name="T9"><text:s/>ЧАСТ</text:span></text:p>
      <text:p text:style-name="P4">ПРЕДГОВОР</text:p>
      <text:p text:style-name="P6">Настоящето повествование има за цел да бъде помощно средство при изучаване на биографията на вторият израелски цар Давид. Насочено е към юношеската аудитория и поради това е наложен на моменти поочупения и по жив стил на изразяване. Вероятно на моменти скуката не може да бъде напълно избегната, но въпреки безкрайната фактология, историята заслужава вниманието и на родители и на ученици, понеже съставлява една никак не маловажна част от това, което днес наричаме - съвременна култура.</text:p>
      <text:p text:style-name="P6"/>
      <text:p text:style-name="P6"/>
      <text:p text:style-name="P5">УВОД</text:p>
      <text:p text:style-name="P5"/>
      <text:p text:style-name="P6">По време на създаването на Израелската държава, първият цар Саул, престава да слуша Господа своя Бог и се налага за Божия народ да бъде намерен нов водач – това както се оказва е Давид.</text:p>
      <text:p text:style-name="P6">Историята на овчарче, което става цар подхожда на приказка, но ако се запознаем с историята на Давид не бихме се чудили толкова. Той е поет и воин, човек по Божията воля и пример за милост. Възход и падение, покаяние и интриги съпътстват живота на бившето овчарче със смело сърце, което има на своя страна </text:p>
      <text:p text:style-name="P6">вярата в живия Бог. </text:p>
      <text:p text:style-name="P6"/>
      <text:p text:style-name="P6"/>
      <text:p text:style-name="P4">Съкращения </text:p>
      <text:p text:style-name="Standard"><text:span text:style-name="T2">1цар. </text:span><text:span text:style-name="T4">=</text:span><text:span text:style-name="T2"> първа книга на царете съответно 2цар.</text:span><text:span text:style-name="T4">=</text:span><text:span text:style-name="T2"> втора книга на царете и т.н. </text:span></text:p>
      <text:p text:style-name="P6"/>
      <text:p text:style-name="P6"/>
      <text:p text:style-name="P10">Епизод 0</text:p>
      <text:p text:style-name="Standard"><text:span text:style-name="T2">Давид е само някакъв си юноша бледен, но е смел и силен, а също и с приятен вид, трепе лъвове и мечки и пасе овце, докато един ден ... при него не пристига един възрастен, направо старец и го <text:s/>помазва. </text:span><text:span text:style-name="T8">Може би някой ще се зачуди какво е това то помазанието. </text:span><text:soft-page-break/><text:span text:style-name="T8">Но за да печелим време накратко метод за приемане на духа с различна цел. </text:span><text:span text:style-name="T5">1цар.16:13”и Господният Дух дойде със сила на Давида от същия ден и после</text:span><text:span text:style-name="T2">”.</text:span></text:p>
      <text:p text:style-name="P6"/>
      <text:p text:style-name="P10">Епизод №1.</text:p>
      <text:p text:style-name="P26">Бог изоставя цар Саул и зъл дух започва да го притеснява. Какво да се прави като и царете имат склонността да полудяват. По съвета на своите слуги Саул решава да извика някой, който и да е, само умее да свири добре. Случило се е точно така, че този човек се е оказал синът на Есей - Давид. Саул го обиква много и затова Давид му става оръженосец.</text:p>
      <text:p text:style-name="Standard"><text:span text:style-name="T6"><text:s/><text:tab/>1Цар. 16:23 </text:span><text:span text:style-name="T5">И когато </text:span><text:span text:style-name="T7">злият</text:span><text:span text:style-name="T5"> дух от Бога беше на Саула, Давид вземаше арфата и свиреше с ръката си; тогава Саул се освежаваше и ставаше му добре, и злият дух се оттеглюваше от него.</text:span></text:p>
      <text:p text:style-name="P26">Давид сигурно е бил много уплашен от царя със злия дух. </text:p>
      <text:p text:style-name="P26"/>
      <text:p text:style-name="P43">Ако желаеш Давид да остане да живее при царя </text:p>
      <text:p text:style-name="P43">– <text:s/>отиди на епизод №2</text:p>
      <text:p text:style-name="P44">Ако предпочиташ Давид да се скрие в къщи, там нейде под юргана – тогава за теб е епизод №3</text:p>
      <text:p text:style-name="P26"/>
      <text:p text:style-name="P7">*<text:tab/>*<text:tab/>*</text:p>
      <text:p text:style-name="P6"/>
      <text:p text:style-name="P10">Епизод №2.</text:p>
      <text:p text:style-name="Standard"><text:span text:style-name="T6">1Цар. 16:22 </text:span><text:span text:style-name="T5">И Саул прати да кажат на Есея: Нека стои Давид пред мене, моля, защото придоби моето благоволение.</text:span></text:p>
      <text:p text:style-name="Standard"><text:span text:style-name="T2"><text:tab/>Така Давид остава да помага на царя с каквото може. Малко по късно, обаче </text:span><text:span text:style-name="T6">1Цар. 17:3 </text:span><text:span text:style-name="T5">Филистимците стояха на хълма от едната страна, а Израил стоеше на хълма от другата страна, и долината беше помежду им. </text:span></text:p>
      <text:p text:style-name="P6">Всички очи са вперени в противника и се опитват да намерят каквато и да е слабост, точно тогава се появява един великан на име Голиат и казва: 1цар.17:8„Изберете си един мъж”. Който от нас двамата победи ще спечели войната. Като чуват тези думи израелтяните се уплашват страшно много и бягат от полесражението. По същото време Давид като най малък от братята си пасе овцете на баща си, но като разбира какво се е случвало оставя всичко и отива да попита дали са живи здрави. Разбира, че всичко е наред и че царят обещава голямо богатство и дъщеря си на този, който успее да победи великана.</text:p>
      <text:p text:style-name="P6"><text:soft-page-break/></text:p>
      <text:p text:style-name="P6">Какво да направи Давид да отиде да се бие заради някаква си там принцеса – епизод №4 </text:p>
      <text:p text:style-name="P6">или да се върне при овцете на баща си и – епизод №5</text:p>
      <text:p text:style-name="P6"/>
      <text:p text:style-name="P6"/>
      <text:p text:style-name="P6"/>
      <text:p text:style-name="P10">Епизод №3</text:p>
      <text:p text:style-name="P6">Давид никога повече не вижда царските палати, но пък за сметка на това намира своята принцеса, влюбва се с вечна и неразделна любов и си казва, че дворците изобщо не го интересуват. </text:p>
      <text:p text:style-name="P6"/>
      <text:p text:style-name="P10">Епизод №4</text:p>
      <text:p text:style-name="P6">Давид е единственият човек, който е готов да защити честа на своя народ и да прослави своя Бог. Разбира се това не е достатъчно да бъде изпратен на битка на живот и смърт, особено като се има предвид, че е тинейджър. Той въпреки това настоява пред царя с думите:</text:p>
      <text:p text:style-name="P14"><text:span text:style-name="T6">1Цар. 17:36 </text:span><text:span text:style-name="T5">Слугата ти е убивал и лъв и мечка, и тоя необрязан филистимец ще бъде като едно от тях, понеже хвърли презрение върху войските на живия Бог.</text:span></text:p>
      <text:p text:style-name="P8">При тази толкова красноречива смелост и вяра царят решил да го пусне да си изпробва късмета.</text:p>
      <text:p text:style-name="P8">Какви оръжия да вземе Давид в тази неравна битка</text:p>
      <text:p text:style-name="P14"><text:span text:style-name="T2">А) Броня и меч<text:tab/></text:span><text:span text:style-name="T1"><text:tab/><text:tab/><text:tab/><text:tab/></text:span><text:span text:style-name="T2">епизод 6</text:span></text:p>
      <text:p text:style-name="P14"><text:span text:style-name="T2">Б) Щит и копие</text:span><text:span text:style-name="T1"><text:tab/><text:tab/><text:tab/><text:tab/></text:span><text:span text:style-name="T2">епизод 7</text:span></text:p>
      <text:p text:style-name="P8">В) Тояга и прашка + пет камъка в торбата <text:tab/>епизод<text:tab/>8</text:p>
      <text:p text:style-name="P8"/>
      <text:p text:style-name="P8"/>
      <text:p text:style-name="P12"/>
      <text:p text:style-name="P10">Епизод №5</text:p>
      <text:p text:style-name="P6">Давид не се жени за царската дъщеря, но животът му завинаги е свързан с политиката на страната и като придворен, честичко е принуден да избира между подмазването и края на привилегиите. В края на краищата все пак не е нещастен – има си всичко, дори и две жени, а и царя си го обичка много и се вслушва от време на време в неговите съвети. </text:p>
      <text:p text:style-name="P6"><text:tab/></text:p>
      <text:p text:style-name="P10">Епизод №6</text:p>
      <text:p text:style-name="P6">Давид не е свикнал да ходи с броня, затова когато е нападнат от великана Голиат не успява да отбива ударите му, както трябва и е <text:soft-page-break/>обезглавен. Смъртта му не изненадва никого и историята някак си продължава без него.</text:p>
      <text:p text:style-name="P6"/>
      <text:p text:style-name="P10">Епизод №7</text:p>
      <text:p text:style-name="P6">Давид още не е израснал напълно и идва малко къс за дългото копие – когато се засилва, за да го хвърли по филистимеца Голиат се спъва, копието се чупи на две и едната му част се забива в стомаха на злополучния герой. Братята и баща му са единствените, които го оплакват, а една или две девойки изненадани от самите себе си ронят крокодилски сълзи.</text:p>
      <text:p text:style-name="P6"/>
      <text:p text:style-name="P10">Епизод №8</text:p>
      <text:p text:style-name="P14"><text:span text:style-name="T2">Преди началото на битката – двамата противници се измерват с очи, което е по трудно за великана понеже трябва да си понапрегне зрението. Когато разбира, че врагът му е още момче и вместо истинско оръжие носи тояга и прашка, Голиат се ядосва и изстрелва през зъби целия си арсенал от простотии. В отговор Давид му казва:.</text:span><text:span text:style-name="T6"> 1Цар. 17:46 </text:span><text:span text:style-name="T5">Днес Господ ще те предаде в ръката ми; и като те поразя ще ти отнема главата, <text:s/>за да познае целият свят, че има Бог </text:span></text:p>
      <text:p text:style-name="P8">След тези думи Голиат скача на Бой, а Давид трябва да направи избор</text:p>
      <text:p text:style-name="P8">А) да избяга и да се скрие не преставайки да громи с думи врага<text:tab/><text:tab/> <text:tab/>Епизод 10</text:p>
      <text:p text:style-name="P8">Б) да използва тоягата си като при овчарски скок и там каквото камък покаже<text:tab/>Епизод<text:tab/> <text:s/>9</text:p>
      <text:p text:style-name="P8">В) да завърти прашката и да разчита на Бог изстрела да е успешен<text:tab/><text:tab/><text:tab/>Епизод <text:s/>11</text:p>
      <text:p text:style-name="P8"/>
      <text:p text:style-name="P11">Епизод № 9</text:p>
      <text:p text:style-name="P8">Давид прави нов световен рекорд на овчарски скок и <text:s/>скачайки цели осем метра се закача като обеца за ухото. След, което се опитва да се покатери по косата на великана, но Голиат е гледал този филм го изтръсква от себе си, както куче се изтръсква от вода. На Давид не му остава нищо друго и си подвива опашката.</text:p>
      <text:p text:style-name="P8"/>
      <text:p text:style-name="P11">Епизод №10</text:p>
      <text:p text:style-name="P8">Давид бяга и даже си плюе на петите като в бързината не престава да разсмива противниковия отбор с вицове за великани. И двете страни се пръсват от смях, а Голиат умира от яд. Накрая всички се разотиват – понеже сеира тъй и тъй е свършил. </text:p>
      <text:p text:style-name="P8"><text:soft-page-break/></text:p>
      <text:p text:style-name="P11">Епизод №11</text:p>
      <text:p text:style-name="P14"><text:span text:style-name="T6">1Цар. 17:49 </text:span><text:span text:style-name="T5">И Давид тури ръката си в торбата си та взе от там камък, и като го хвърли с прашката, удари филистимеца в челото му, така щото камъкът се заби в челото му; и той падна по лицето си на земята. </text:span></text:p>
      <text:p text:style-name="P8">Наградата на Давид е твърде голяма: Царят го поставя над другите си воини и синът му Йонатан му става пръв приятел, но когато се превръща в любимец на народа, монарха започва да ревнува дотам, че да иска да го убие. Саул се изхитрява дотам, че решава да даде дъщеря си Михала за жена на Давид, но само ако убие в срок 100 човека от филистимските врагове. Давид иска да се ожени и то много, но какво ли да направи?</text:p>
      <text:p text:style-name="P8"/>
      <text:list xml:id="list159673186428944711" text:style-name="WW8Num1">
        <text:list-item>
          <text:p text:style-name="P33">отказва и си гледа кефа на чиновническа заплата <text:tab/><text:tab/>Епизод 14<text:tab/><text:tab/></text:p>
        </text:list-item>
        <text:list-item>
          <text:p text:style-name="P33">приема от кумува срама, но понеже не му се мре все пак – чака да мине срока<text:tab/><text:tab/><text:tab/><text:tab/><text:tab/><text:tab/><text:tab/><text:tab/><text:tab/><text:tab/>Епизод 13</text:p>
        </text:list-item>
        <text:list-item>
          <text:p text:style-name="P33">приема и заедно с няколко от момчетата минава в тила на врага<text:tab/><text:tab/><text:tab/><text:tab/><text:tab/><text:tab/><text:tab/><text:tab/><text:tab/><text:tab/><text:tab/>Епизод 12</text:p>
        </text:list-item>
      </text:list>
      <text:p text:style-name="P8"/>
      <text:p text:style-name="P11">Епизод №12</text:p>
      <text:p text:style-name="P14"><text:span text:style-name="T2">Давид не си губи времето и на бърза ръка избива дори 200 човека. И като видя, че Господ беше с него </text:span><text:span text:style-name="T6">1Цар. 18:29 </text:span><text:span text:style-name="T5">Саул стана Давидов враг за ви</text:span><text:span text:style-name="T2">наги. Царят е толкова бесен, че хвърля копие </text:span><text:span text:style-name="T13">1Цар. 18:10 </text:span><text:span text:style-name="T14">И на следния ден зъл дух от Бога нападна Саула, и той лудееше всред къщата си; и Давид свиреше с ръката си, както всеки ден, а Саул държеше </text:span><text:span text:style-name="T25">копието</text:span><text:span text:style-name="T14"> си в ръка.</text:span></text:p>
      <text:p text:style-name="P14"><text:span text:style-name="T13">1Цар. 18:11 </text:span><text:span text:style-name="T14">И Саул хвърли копието, като каза: Ще закова</text:span></text:p>
      <text:p text:style-name="P8"/>
      <text:p text:style-name="P14"><text:span text:style-name="T2">От тук нататък за нашия герой настъпват тежки времена. Царят го подгонва и пада наистина голямо бягане. Помагат му и синът на царя Йонатан, че и дъщеря му Михала, вероятно защото още е влюбена в него, пък и са женени на това отгоре. Известно време Давид се крие между пророците в един известен за времето си град и се опитва да се сдобри със Саул, чрез Йонатан. За жалост царят изобщо не ще да го чуе и въпреки голямата си любов към Давид, синът на монарха е безсилен да му помогне. </text:span><text:span text:style-name="T13">1Цар. 21:1 </text:span><text:span text:style-name="T12">Тогава Давид дойде в Ноб при свещеника Ахимелех и му каза: </text:span><text:soft-page-break/><text:span text:style-name="T13">1Цар. 21:3 „</text:span><text:span text:style-name="T12">Дай в ръката ми пет хляба, или каквото се намира</text:span><text:span text:style-name="T14">.</text:span><text:span text:style-name="T12">” </text:span><text:span text:style-name="T14">Свещеникът има на разположение само осветени хлябове, но след кратко колебание ги дава на героя, който отпрашва на гости при съседния цар Анхус.</text:span><text:span text:style-name="T13"> 1Цар. 21:11 </text:span><text:span text:style-name="T12">А слугите на Анхуса му казаха: Тоя Давид не е ли цар на земята? Не е ли той, за когото пееха ответно в хороигранията, като казваха: -</text:span></text:p>
      <text:p text:style-name="P15"><text:tab/>Саул порази хилядите си,</text:p>
      <text:p text:style-name="P15"><text:tab/>А Давид десетките си хиляди?</text:p>
      <text:p text:style-name="P19">Давид се уплашва от тези думи и съставя нов план: </text:p>
      <text:list xml:id="list7734034897570091673" text:style-name="WW8Num2">
        <text:list-item>
          <text:p text:style-name="P39">почва да се представя за магьосник – епизод 15</text:p>
        </text:list-item>
        <text:list-item>
          <text:p text:style-name="P39">преструва се на ненормален епизод епизод 16</text:p>
        </text:list-item>
        <text:list-item>
          <text:p text:style-name="P39">прави се на на каратист епизод 17</text:p>
        </text:list-item>
      </text:list>
      <text:p text:style-name="P8"/>
      <text:p text:style-name="P6"/>
      <text:p text:style-name="P10">Епизод №13</text:p>
      <text:p text:style-name="P6">Въпреки, че не се спрява със срока Давид пак се жени за Михала, която не го пуска много да излиза от къщи. На нашия зет под чехъл това не му харесва, даже и малко, но <text:s text:c="2"/>все по често се оттегля да си свири на лирата, понеже така на никого не пречи.</text:p>
      <text:p text:style-name="P5"/>
      <text:p text:style-name="P10">Епизод №14</text:p>
      <text:p text:style-name="P6">Давид се отказва и моли да бъде преразпределен от войската в училище за войници – там обучава прясно месо в продължение на дълги години и става известен с добрата си тактика. Умира на преклонна възраст от скука.</text:p>
      <text:p text:style-name="P13"/>
      <text:p text:style-name="P5"/>
      <text:p text:style-name="P10">Епизод №15</text:p>
      <text:p text:style-name="P6">Магьосническата кариера не продължава по дълго от две минути, след което всички започват да се смеят неистово. Давид е обзаведен с чисто нов затвор и ежедневна дажба хляб и вода. Царят пощадява животът му, понеже го смята за забавен. Бившият герой изживява живота си като придворен шут, но поне има къде да спи и никой не го гони с копие, за да го убие. Новата му философия – животът е хубав, когато си сит – става популярен негов музикален хит, който се изпълнява и след смъртта му.</text:p>
      <text:p text:style-name="P6"/>
      <text:p text:style-name="P16"/>
      <text:p text:style-name="P16">Епизод №16</text:p>
      <text:p text:style-name="P14"><text:span text:style-name="T14">Давид се прави на луд и царят като го вижда </text:span><text:span text:style-name="T12">1.цар.21:14 „</text:span><text:span text:style-name="T5">Анхус каза на слугите си: Ето, виждате, че тоя човек е луд; тогава </text:span><text:soft-page-break/><text:span text:style-name="T5">защо го доведохте при мене?</text:span><text:span text:style-name="T6">1Цар. 21:15 </text:span><text:span text:style-name="T5">Малко ли са моите луди” </text:span><text:span text:style-name="T13">1Цар. 22:1 </text:span><text:span text:style-name="T12">Тогава </text:span><text:span text:style-name="T26">Давид</text:span><text:span text:style-name="T12"> излезе от там, та избяга в пещерата Одолам; и братята му и целият му бащин дом, когато чуха, слязоха там при него.</text:span><text:span text:style-name="T5"> </text:span><text:span text:style-name="T6">1Цар. 22:2 </text:span><text:span text:style-name="T5">И всички, които бяха в утеснение, и всички длъжници, и всички огорчени се събраха при него, и той им стана началник; и така, с него имаше около четиристотин мъже.</text:span></text:p>
      <text:p text:style-name="P14"><text:span text:style-name="T2">Саул пък избива свещениците, които са помогнали на Давид. Само един на име Авиатар оцелява и бяга при бунтовниците като им съобщава последните новини. Саул не спира да гони не когото трябва и си отдъхва само при нападения на враговете на божия народ – филистимците. Един път обаче</text:span><text:span text:style-name="T6"> Саул 1Цар. 24:3 </text:span><text:span text:style-name="T5">„ дойде при кошарите на овците край пътя, гдето имаше пещера; там Саул влезе по нуждата си, а Давид и мъжете му седяха по-навътре в пещерата.</text:span><text:span text:style-name="T6">1Цар. 24:4 </text:span><text:span text:style-name="T5">И мъжете на Давида му рекоха: Ето денят, за който Господ ти каза: Ето Аз ще предам неприятеля ти в ръката ти, и ще му сториш както ти се вижда за добро.”</text:span></text:p>
      <text:p text:style-name="P8">Какво ще направи Давид на Саул: </text:p>
      <text:p text:style-name="P8">1) реже му ухото за назидание, че да чува по добре Господ <text:s text:c="5"/>- епизод 18 </text:p>
      <text:p text:style-name="P8">2) убива го на място и се възцарява над цялата страна <text:s/><text:tab/><text:tab/>- епизод 19</text:p>
      <text:p text:style-name="P8">3) реже част от мантията на царя <text:tab/><text:tab/><text:tab/><text:tab/><text:tab/>- епизод 20</text:p>
      <text:p text:style-name="P12"/>
      <text:p text:style-name="P18"/>
      <text:p text:style-name="P21">Епизод №17</text:p>
      <text:p text:style-name="P18">Давид се прави доста умело на каратист, но една жена му подлага динена кора и когато сложното му изпълнение завършва с неумело салто назад точно в дините на някакъв си търговец, не остава никакво съмнение, че е всъщност най-обикновен простосмъртен. Оковават го и го изтъргуват на филистимците, които естествено много му се израдват и го благославят с <text:s/>тояга и камшик, докато умре от загуба на достойнство и кръв. </text:p>
      <text:p text:style-name="P18"/>
      <text:p text:style-name="P16">Епизод №18</text:p>
      <text:p text:style-name="P18">Всъщност Давид никога не е бил добър в рязането на уши и понеже не му се намира упойка под ръка успява да привлече вниманието на царя, след което се налага и да го убие – отиди на епизод 19</text:p>
      <text:p text:style-name="P18"/>
      <text:p text:style-name="P18"><text:soft-page-break/></text:p>
      <text:p text:style-name="P16">Епизод №19</text:p>
      <text:p text:style-name="P18">Давид става цар на целокупния Божи народ, обаче всички го запомнят като тиран. След 15 години го убива едно от собствените му деца и защото така отмъщава за дядо си Саул, хвърля трупа на кучетата.</text:p>
      <text:p text:style-name="P21"/>
      <text:p text:style-name="P16">Епизод №20</text:p>
      <text:p text:style-name="P14"><text:span text:style-name="T3">Давид пощадява Саул и настоящият цар – казва: </text:span><text:span text:style-name="T6">1Цар. 24:18 </text:span><text:span text:style-name="T5">И ти показа днес, че си ми сторил добро, защото, когато Господ бе ме предал в ръцете ти, ти не ме уби.</text:span><text:span text:style-name="T6"> 1Цар. 24:20 </text:span><text:span text:style-name="T5">И сега, ето, познавам че наистина ти ще станеш цар, и че Израилевото царство ще се утвърди в твоята ръка</text:span><text:span text:style-name="T2">. След тези думи всички действащи лица се разотивът. В същото време умира пророкът и съдията Самуил и за известно време цари мир между израелтяните. На Давид не му е лесно да се грижи за прехраната на хората си в мирно време, но пък затова в пустинята има много пастири, които имат нужда от закрила за своите многобройни стада. Давид се грижи за стадата на един особено богат човек на име Навал и то по такъв начин, че не изчезва нито едно животно. Когато обаче решава да поиска някаква награда за своите действия го обиждат и ядосан героят решава със сила да вземе това, което му се полага. Насреща му излиза умната жена на богаташа – Авигея. Тя носи дължимото и моли за милост. Как постъпва Давид : </text:span></text:p>
      <text:list xml:id="list2885282449455597667" text:style-name="WW8Num3">
        <text:list-item>
          <text:p text:style-name="P34">Махва с ръка и продължава по пътя си. Навал се задавя с риба и умира, а Авигея е вече и свободна, и не дотам отвратителна. - Епизод <text:s/>23</text:p>
        </text:list-item>
        <text:list-item>
          <text:p text:style-name="P34">Изнасилва съпругата и убива мъжа, после разграбва имота. <text:s text:c="2"/>- Епизод <text:s/>21 </text:p>
        </text:list-item>
        <text:list-item>
          <text:p text:style-name="P34">Убива всички, които му се изпречват на пътя и устройва пир <text:s/>- <text:s/>Епизод 22</text:p>
        </text:list-item>
      </text:list>
      <text:p text:style-name="P9"/>
      <text:p text:style-name="P10">Епизод №21</text:p>
      <text:p text:style-name="P6">След като постъпва така жестоко – Давид е отхвърлен от Бог и прекарва остатъка от живота си в самосъжаление. </text:p>
      <text:p text:style-name="P18"/>
      <text:p text:style-name="P16"/>
      <text:p text:style-name="P16">Епизод №22</text:p>
      <text:p text:style-name="P18">По време на пира Давид пие като разпран и не спира да се храни от разказите за собствените си подвизи. Уморен от хвалене отива да си легне и умира от простотия и алкохолно натравяне на кръвта . </text:p>
      <text:p text:style-name="P6"><text:soft-page-break/></text:p>
      <text:p text:style-name="P10">Епизод №23</text:p>
      <text:p text:style-name="Standard"><text:span text:style-name="T2">Давид хвали Господа за справедливостта Му и се жени за Авигея. После Саул отново тръгва срещу него. Героят се промъква през нощта в царския лагер, взема за доказателство царското копие и от един по далечен хълм разказва как отново му е пощадил живота.</text:span><text:span text:style-name="T5"> </text:span><text:span text:style-name="T6">1Цар. 26:25 </text:span><text:span text:style-name="T5">Тогава Саул каза на Давида: Да си благословен, чадо мое, Давиде! ти непременно ще извършиш </text:span><text:span text:style-name="T7">велики дела</text:span><text:span text:style-name="T5">, и без друго ще надделееш. И така, Давид отиде в пътя си; а Саул се върна на мястото си</text:span><text:span text:style-name="T2">. </text:span></text:p>
      <text:p text:style-name="P6"/>
      <text:p text:style-name="P10">Епизод №24</text:p>
      <text:p text:style-name="P6">Все пак като,че ли на Саул не може да се има вяра и затова Давид бяга заедно със 600-те си мъже и техните семейства. Отива при един от филистимските царе, на име Анхус, защото си казва, че там вече Саул няма да посмее да го гони. И наистина става точно така. Давид и воините му служат вярно на този цар и той дори им подарява град Сиклаг за живеене. От тази база те извършват много набези по посока на съседни народи - врагове и на филистимците и на израелтяните и обогатяват себе си и царя, който си мисли, че Давид е станал омразен на собствения си народ и ще му служи вечно.</text:p>
      <text:p text:style-name="P6"/>
      <text:p text:style-name="P10">Епизод №25</text:p>
      <text:p text:style-name="P14"><text:span text:style-name="T2">Филистимците се събират за война против Израел. А Самуил вече не е между живите и в страха си, като не знае кого да попита, Саул се обръща към една вещица за съвет. Тя всъщност е запитвачка на зли духове и не ще да врачува на царя на божия народ, защото се бои от Господ. Накрая все пак склонява и на среща със Саул се явява Самуил. Мнимият мъртвецът (всъщност зъл дух) изрича страшно пророчество и то се сбъдва до последната дума. </text:span><text:span text:style-name="T13">1Цар. 28:17 </text:span><text:span text:style-name="T12">Ето, Господ си извърши, според както бе говорил чрез мене; защото Господ откъсна царството от твоята ръка и го даде на ближния ти Давида.</text:span><text:span text:style-name="T13"> 1Цар. 28:18 </text:span><text:span text:style-name="T12">Понеже ти не се покори на гласа на Господа, като не извърши върху Амалика </text:span><text:span text:style-name="T16">според</text:span><text:span text:style-name="T12"> големия Му гняв, затова Господ ти направи това нещо днес.</text:span><text:span text:style-name="T13"> 1Цар. 28:19 </text:span><text:span text:style-name="T12">При това, Господ ще предаде Израиля с тебе в ръката на филистимците; и утре ти и синовете ти ще бъдете при мене; и Господ ще предаде множеството на израилтяните в ръката на филистимците. </text:span></text:p>
      <text:p text:style-name="P28"><text:span text:style-name="T23"></text:span><text:span text:style-name="T12"> </text:span><text:span text:style-name="T17">следва продължение в следващия ни епизод</text:span></text:p>
      <text:p text:style-name="P15"><text:soft-page-break/></text:p>
      <text:p text:style-name="P15"><text:tab/><text:tab/><text:tab/><text:tab/><text:tab/>Епизод №25</text:p>
      <text:p text:style-name="P19">До битката остава малко време и филистимските военачалници отпращат Давид, за да не реши да се включи в битката на страната на своите си. Героят няма никакъв избор и се връща в дома си в Сиклаг. Градът обаче е изгорен, всичките богатства са иззети, а жените и децата са откарани в плен. Всички се натъжават и плачат, а някои дори предлагат да убият Давид. </text:p>
      <text:p text:style-name="P19">Като чува това Давид решава :</text:p>
      <text:list xml:id="list4916426545430878029" text:style-name="WW8Num4">
        <text:list-item>
          <text:p text:style-name="P40">Да си раздере дрехите и да пости – Епизод 26</text:p>
        </text:list-item>
        <text:list-item>
          <text:p text:style-name="P40">Да си плюе на петите – Епизод 27</text:p>
        </text:list-item>
        <text:list-item>
          <text:p text:style-name="P40">Да се допита до Господа - Епизод 28</text:p>
        </text:list-item>
      </text:list>
      <text:p text:style-name="P19"/>
      <text:p text:style-name="P17">Епизод №26</text:p>
      <text:p text:style-name="P19">Давид пости и се моли и Господ праща ангел, който го съветва да извика свещеника Авиатар. Отиди на Епизод 28</text:p>
      <text:p text:style-name="P19"/>
      <text:p text:style-name="P17">Епизод №27</text:p>
      <text:p text:style-name="P19">Давид си плюе толкова здраво на петите, че чак наема кораб и се запътва към Индия. По пътя го пресреща торнадо и го изстрелва на непозната територия. Така по погрешка героя открива Америка. Пробва да се върне, но по това време дървените кораби трудно се справят с големите разстояния и понеже не познават навигацията и звездите се отправят към Антарктида, където му измръзва носа и завинаги се отказва от приключения. <text:s/></text:p>
      <text:p text:style-name="P19"/>
      <text:p text:style-name="P17">Епизод №28</text:p>
      <text:p text:style-name="P14"><text:span text:style-name="T14">Като чува това Давид извиква свещеника Авиатар и се допитва до Господа </text:span><text:span text:style-name="T12">казвайки: Да преследвам ли тоя полк? ще ги стигна ли? А Той му отговори: Преследвай, защото без друго ще ги стигнеш, и непременно ще отървеш </text:span><text:span text:style-name="T16">всичко</text:span><text:span text:style-name="T21">.</text:span><text:span text:style-name="T20"> </text:span><text:span text:style-name="T14">Давид отново успява и се утвърждава като ръководител на хората си. Богатствата, които идват в повече ги праща като подарък в Юда – едно от израелските племена.</text:span><text:span text:style-name="T12"> </text:span><text:span text:style-name="T23"></text:span><text:span text:style-name="T18"> </text:span><text:span text:style-name="T17">очаквайте продължение </text:span><text:span text:style-name="T24"></text:span></text:p>
      <text:p text:style-name="P22"/>
      <text:p text:style-name="P24"/>
      <text:p text:style-name="P25"/>
      <text:p text:style-name="P14"><text:span text:style-name="T22"><text:tab/><text:tab/><text:tab/><text:tab/><text:tab/></text:span><text:span text:style-name="T10">I</text:span><text:span text:style-name="T9"> </text:span><text:span text:style-name="T10">I</text:span><text:span text:style-name="T11"> </text:span><text:span text:style-name="T9"><text:s text:c="3"/>ЧАСТ</text:span></text:p>
      <text:p text:style-name="P22"/>
      <text:p text:style-name="P22"/>
      <text:p text:style-name="P22"/>
      <text:p text:style-name="P17"><text:soft-page-break/>Епизод №29</text:p>
      <text:p text:style-name="P14"><text:span text:style-name="T14">По същото време филистимците и израелтяните са се хванали здраво за гушите. Саул се самоубива след като вижда, че нещата отиват към пълно поражение и дори той самият е тежко ранен от стрелци. В същия ден умират и тримата му сина и всички мъже, които са с него. Израелтяните се разбягват, а филистимците се заселват по техните градове. Един момък идва при Давид и му съобщава всичко, което е станало, с едно изключение. Като знае, че Саул и Давид не са в добри отношения излъгва и казва, че сам е убил първият цар на божия народ.</text:span><text:span text:style-name="T19"> </text:span><text:span text:style-name="T14">От тези новини всички са натъжени и скърбят, а какво да направи Давид : </text:span></text:p>
      <text:p text:style-name="P27"><text:span text:style-name="T14">Да награди момъка - </text:span><text:span text:style-name="T15">Епизод 30</text:span><text:span text:style-name="T14"> или да го накаже <text:s/>- </text:span><text:span text:style-name="T15">Епизод 31</text:span></text:p>
      <text:p text:style-name="P19"/>
      <text:p text:style-name="P17">Епизод №30</text:p>
      <text:p text:style-name="P14"><text:span text:style-name="T14">Давид награждава лъжеца, но народът не харесва точно тази стратегия и когато заявява, че след като тъй и тъй е помазан, може да им бъде цар, никой не му обръща внимание.</text:span><text:span text:style-name="T19"> Давид все пак си има собствен град, който управлява до дълбока старост, но никой не го помни кой знае колко след смъртта му.</text:span></text:p>
      <text:p text:style-name="P19"/>
      <text:p text:style-name="P17">Епизод №31</text:p>
      <text:p text:style-name="P19">Давид наказва момъка със смърт </text:p>
      <text:p text:style-name="P23"/>
      <text:p text:style-name="P20"/>
      <text:p text:style-name="P1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bg" fo:country="BG"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WW8Num1z0" style:family="text">
      <style:text-properties style:font-name="Tahoma" fo:font-size="14pt" style:font-size-asian="14pt" style:font-name-complex="Tahoma"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Tahoma" fo:font-size="14pt" style:font-size-asian="14pt" style:font-name-complex="Tahoma"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ahoma" fo:font-size="14pt" style:font-size-asian="14pt" style:font-name-complex="Tahoma"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Tahoma"/>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ДАВИД</dc:title>
    <meta:initial-creator>none</meta:initial-creator>
    <meta:creation-date>2006-08-23T12:13:00</meta:creation-date>
    <dc:creator>Stormi Slovnik</dc:creator>
    <dc:date>2019-11-10T08:17:02.24</dc:date>
    <meta:editing-cycles>5</meta:editing-cycles>
    <meta:editing-duration>PT12H42M52S</meta:editing-duration>
    <meta:generator>OpenOffice/4.1.5$Win32 OpenOffice.org_project/415m1$Build-9789</meta:generator>
    <meta:document-statistic meta:table-count="0" meta:image-count="0" meta:object-count="0" meta:page-count="11" meta:paragraph-count="126" meta:word-count="3377" meta:character-count="18182"/>
  </office:meta>
</office:document-meta>
</file>